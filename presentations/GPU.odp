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F00000323C33AA24843DC609B.png" manifest:media-type="image/png"/>
  <manifest:file-entry manifest:full-path="Pictures/100000010000046700000427FA61E937DE3A1336.png" manifest:media-type="image/png"/>
  <manifest:file-entry manifest:full-path="Pictures/100000000000033F00000323888EE9F593E128EC.png" manifest:media-type="image/png"/>
  <manifest:file-entry manifest:full-path="Pictures/100000000000033F000003237A5DB86DBA840BDE.png" manifest:media-type="image/png"/>
  <manifest:file-entry manifest:full-path="Pictures/1000000000000297000000A717922BB6DE7D08B5.png" manifest:media-type="image/png"/>
  <manifest:file-entry manifest:full-path="Pictures/1000000000000297000000A706F70F8D9F0D3F07.png" manifest:media-type="image/png"/>
  <manifest:file-entry manifest:full-path="Pictures/10000017000002580000016080686393729D8AE2.gif" manifest:media-type="image/gif"/>
  <manifest:file-entry manifest:full-path="Pictures/1000000100000345000000E5EC8B3946AB8EE916.png" manifest:media-type="image/png"/>
  <manifest:file-entry manifest:full-path="Pictures/100000000000033F00000323563A203FA3D6F1BA.png" manifest:media-type="image/png"/>
  <manifest:file-entry manifest:full-path="Pictures/10000000000002C70000026979D7019C91E86ADB.png" manifest:media-type="image/png"/>
  <manifest:file-entry manifest:full-path="Pictures/100000000000033F00000323ABDAEBCE94557BDA.png" manifest:media-type="image/png"/>
  <manifest:file-entry manifest:full-path="Pictures/100000000000029700000099056219FED825A8B9.png" manifest:media-type="image/png"/>
  <manifest:file-entry manifest:full-path="Pictures/1000000000000966000005783885B3570A89B65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25" style:family="graphic" style:parent-style-name="standard">
      <style:graphic-properties draw:stroke="none" draw:fill="none" draw:fill-color="#ffffff" draw:textarea-horizontal-align="left" draw:textarea-vertical-align="middle" draw:auto-grow-height="false" fo:min-height="2.368cm" fo:min-width="24.697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33" style:family="graphic" style:parent-style-name="standard">
      <style:graphic-properties draw:stroke="none" draw:fill="none" draw:fill-color="#ffffff" draw:textarea-horizontal-align="left" draw:textarea-vertical-align="middle" draw:auto-grow-height="false" fo:min-height="8.873cm" fo:min-width="24.697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>
      <style:graphic-properties style:protect="size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5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21cm" fo:min-width="16.645cm" fo:padding-top="0.125cm" fo:padding-bottom="0.125cm" fo:padding-left="0.25cm" fo:padding-right="0.25cm" fo:wrap-option="wrap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6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6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6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7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7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7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7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7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133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845cm" fo:min-width="0cm" fo:padding-top="0cm" fo:padding-bottom="0cm" fo:padding-left="0cm" fo:padding-right="0cm" fo:wrap-option="wrap" draw:shadow-color="#808080"/>
      <style:paragraph-properties style:writing-mode="lr-tb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fo:min-height="12.572cm" draw:shadow-color="#808080"/>
      <style:paragraph-properties style:writing-mode="lr-tb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fo:min-height="12.572cm" draw:shadow-color="#808080"/>
      <style:paragraph-properties style:writing-mode="lr-tb"/>
    </style:style>
    <style:style style:name="pr4" style:family="presentation" style:parent-style-name="Title1-notes">
      <style:graphic-properties draw:fill-color="#ffffff" fo:min-height="12.568cm"/>
      <style:paragraph-properties style:writing-mode="lr-tb"/>
    </style:style>
    <style:style style:name="P1" style:family="paragraph">
      <style:paragraph-properties fo:margin-left="0cm" fo:margin-right="0cm" fo:margin-top="0.004cm" fo:margin-bottom="0.004cm" fo:line-height="100%" fo:text-indent="0cm" style:punctuation-wrap="simple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004cm" fo:margin-bottom="0.004cm" fo:line-height="100%" fo:text-align="center" fo:text-indent="0cm" style:punctuation-wrap="simple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004cm" fo:margin-bottom="0.004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.379cm" fo:margin-bottom="0.004cm" fo:line-height="100%" fo:text-indent="0cm" style:punctuation-wrap="simple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.401cm" fo:margin-bottom="0.004cm" fo:line-height="100%" fo:text-align="start" fo:text-indent="0cm" style:punctuation-wrap="simple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.379cm" fo:margin-bottom="0.004cm" fo:line-height="100%" fo:text-indent="0cm" style:punctuation-wrap="simple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margin-top="0.379cm" fo:margin-bottom="0.004cm" fo:line-height="100%" fo:text-indent="0cm" style:punctuation-wrap="simple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margin-top="0.503cm" fo:margin-bottom="0.004cm" fo:line-height="100%" fo:text-align="center" fo:text-indent="0cm" style:punctuation-wrap="simple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.503cm" fo:margin-bottom="0.004cm" fo:line-height="100%" fo:text-align="center" fo:text-indent="0cm" style:punctuation-wrap="simple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margin-top="0.503cm" fo:margin-bottom="0.004cm" fo:line-height="100%" fo:text-indent="0cm" style:punctuation-wrap="simple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.503cm" fo:margin-bottom="0.004cm" fo:line-height="100%" fo:text-indent="0cm" style:punctuation-wrap="simple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.004cm" fo:margin-bottom="0.004cm" fo:line-height="100%" fo:text-align="center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.004cm" fo:margin-bottom="0.004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.004cm" fo:margin-bottom="0.004cm" fo:line-height="100%" fo:text-indent="0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margin-top="0.004cm" fo:margin-bottom="0.004cm" fo:line-height="100%" fo:text-align="center" fo:text-indent="0cm" style:punctuation-wrap="simple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1" style:family="paragraph">
      <loext:graphic-properties draw:fill="none" draw:fill-color="#ffffff"/>
      <style:paragraph-properties fo:margin-left="0cm" fo:margin-right="0cm" fo:margin-top="0.004cm" fo:margin-bottom="0.004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2" style:family="paragraph">
      <style:paragraph-properties fo:margin-left="0cm" fo:margin-right="0cm" fo:margin-top="0.379cm" fo:margin-bottom="0.004cm" fo:line-height="100%" fo:text-indent="0cm" style:punctuation-wrap="simple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3" style:family="paragraph">
      <style:paragraph-properties fo:margin-left="0cm" fo:margin-right="0cm" fo:margin-top="0.379cm" fo:margin-bottom="0.004cm" fo:line-height="100%" fo:text-indent="0cm" style:punctuation-wrap="simple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4" style:family="paragraph">
      <loext:graphic-properties draw:fill="none" draw:fill-color="#ffffff"/>
      <style:paragraph-properties fo:margin-left="0cm" fo:margin-right="0cm" fo:margin-top="0.379cm" fo:margin-bottom="0.004cm" fo:line-height="100%" fo:text-indent="0cm" style:punctuation-wrap="simple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5" style:family="paragraph">
      <loext:graphic-properties draw:fill="none" draw:fill-color="#ffffff"/>
      <style:text-properties fo:font-size="12pt"/>
    </style:style>
    <style:style style:name="T1" style:family="text">
      <style:text-properties fo:color="#000000" loext:opacity="100%" style:text-position="0% 100%" style:font-name="Arial" fo:font-size="36pt" fo:language="en" fo:country="US" style:font-size-asian="36pt" style:language-asian="en" style:country-asian="US" style:font-size-complex="36pt" style:language-complex="en" style:country-complex="US"/>
    </style:style>
    <style:style style:name="T2" style:family="text">
      <style:text-properties fo:color="#000000" loext:opacity="100%" style:text-position="0% 100%" style:font-name="Arial" fo:font-size="32pt" fo:language="en" fo:country="US" style:font-size-asian="32pt" style:language-asian="en" style:country-asian="US" style:font-size-complex="32pt" style:language-complex="en" style:country-complex="US"/>
    </style:style>
    <style:style style:name="T3" style:family="text">
      <style:text-properties fo:color="#000000" loext:opacity="100%" style:text-position="0% 100%"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color="#000000" loext:opacity="100%" style:text-line-through-style="none" style:text-line-through-type="none" style:text-position="0% 100%" style:font-name="Arial" fo:font-size="22pt" fo:language="en" fo:country="US" fo:font-style="normal" fo:text-shadow="none" style:text-underline-style="none" fo:font-weight="normal" style:font-name-asian="Noto Sans CJK SC1" style:font-size-asian="22pt" style:language-asian="en" style:country-asian="US" style:font-style-asian="normal" style:font-weight-asian="normal" style:font-name-complex="Noto Sans CJK SC1" style:font-size-complex="22pt" style:language-complex="en" style:country-complex="US" style:font-style-complex="normal" style:font-weight-complex="normal" style:font-relief="none"/>
    </style:style>
    <style:style style:name="T5" style:family="text">
      <style:text-properties fo:color="#ccccff" loext:opacity="100%" style:text-position="0% 100%" style:font-name="Arial" fo:font-size="24pt" fo:language="en" fo:country="US" style:text-underline-style="solid" style:text-underline-width="auto" style:text-underline-color="font-color" style:font-size-asian="24pt" style:language-asian="en" style:country-asian="US" style:font-size-complex="24pt" style:language-complex="en" style:country-complex="US"/>
    </style:style>
    <style:style style:name="T6" style:family="text">
      <style:text-properties fo:color="#000000" loext:opacity="100%" style:text-position="0% 100%" style:font-name="Arial"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T7" style:family="text">
      <style:text-properties fo:color="#000000" loext:opacity="100%" style:text-position="0% 100%" style:font-name="Arial" fo:font-size="22pt" fo:language="en" fo:country="US" style:font-size-asian="22pt" style:language-asian="en" style:country-asian="US" style:font-size-complex="22pt" style:language-complex="en" style:country-complex="US"/>
    </style:style>
    <style:style style:name="T8" style:family="text">
      <style:text-properties fo:color="#000000" loext:opacity="100%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name-asian="Noto Sans CJK SC1" style:font-size-asian="24pt" style:language-asian="en" style:country-asian="US" style:font-style-asian="normal" style:font-weight-asian="normal" style:font-name-complex="Noto Sans CJK SC1" style:font-size-complex="24pt" style:language-complex="en" style:country-complex="US" style:font-style-complex="normal" style:font-weight-complex="normal" style:font-relief="none"/>
    </style:style>
    <style:style style:name="T9" style:family="text">
      <style:text-properties fo:color="#000000" loext:opacity="100%" style:text-position="0% 100%" style:font-name="Arial" fo:font-size="18pt" fo:language="en" fo:country="US" style:font-name-asian="DejaVu Sans" style:font-size-asian="18pt" style:language-asian="en" style:country-asian="US" style:font-name-complex="DejaVu Sans" style:font-size-complex="18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">
        <style:list-level-properties text:space-before="0.3cm" text:min-label-width="0.8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99cm" text:min-label-width="0.9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office:forms form:automatic-focus="false" form:apply-design-mode="false"/>
        <draw:frame presentation:style-name="pr1" draw:text-style-name="P2" draw:layer="layout" svg:width="25.197cm" svg:height="2.844cm" svg:x="1.269cm" svg:y="2.853cm" presentation:class="title" presentation:user-transformed="true">
          <draw:text-box>
            <text:list text:style-name="L1">
              <text:list-header>
                <text:p text:style-name="P1"><text:span text:style-name="T1">Using and teaching GPU Accelerated Image </text:span><text:span text:style-name="T1">Analysis</text:span></text:p>
              </text:list-header>
            </text:list>
          </draw:text-box>
        </draw:frame>
        <draw:custom-shape draw:style-name="gr1" draw:text-style-name="P4" draw:layer="layout" svg:width="25.197cm" svg:height="9.133cm" svg:x="1.473cm" svg:y="5.472cm">
          <text:list text:style-name="L1">
            <text:list-header>
              <text:p text:style-name="P3"><text:span text:style-name="T2">Brian Northa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1" presentation:class="page"/>
          <draw:frame presentation:style-name="pr2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1">
        <office:forms form:automatic-focus="false" form:apply-design-mode="false"/>
        <draw:frame presentation:style-name="pr1" draw:text-style-name="P2" draw:layer="layout" svg:width="25.197cm" svg:height="2.844cm" svg:x="1.269cm" svg:y="2.853cm" presentation:class="title" presentation:user-transformed="true">
          <draw:text-box>
            <text:list text:style-name="L1">
              <text:list-header>
                <text:p text:style-name="P1"><text:span text:style-name="T1">Using and teaching GPU Accelerated Image </text:span><text:span text:style-name="T1">Analysis</text:span></text:p>
              </text:list-header>
            </text:list>
          </draw:text-box>
        </draw:frame>
        <draw:custom-shape draw:style-name="gr2" draw:text-style-name="P4" draw:layer="layout" svg:width="25.197cm" svg:height="9.133cm" svg:x="1.473cm" svg:y="5.472cm">
          <text:list text:style-name="L1">
            <text:list-header>
              <text:p text:style-name="P3"><text:span text:style-name="T2">Technologies used and lessons learned at the 2023 PoL (Physics of Life) BioImage Analysis GPU Image Analysis course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8.622cm" svg:height="10.478cm" svg:x="1.482cm" svg:y="2.121cm" draw:page-number="2" presentation:class="page"/>
          <draw:frame presentation:style-name="pr2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" draw:style-name="dp1" draw:master-page-name="Title1">
        <draw:custom-shape draw:style-name="gr3" draw:text-style-name="P4" draw:layer="layout" svg:width="25.197cm" svg:height="2.628cm" svg:x="1.27cm" svg:y="1.905cm">
          <text:list text:style-name="L1">
            <text:list-header>
              <text:p text:style-name="P3"><text:span text:style-name="T1">PoL BioImage Analysis Symposium 20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8" draw:layer="layout" svg:width="25.197cm" svg:height="9.133cm" svg:x="1.473cm" svg:y="5.212cm">
          <text:list text:style-name="L2">
            <text:list-item>
              <text:p text:style-name="P6"><text:span text:style-name="T3">Dresden Aug 28th - Sep 1st 2023</text:span></text:p>
            </text:list-item>
            <text:list-item>
              <text:p text:style-name="P6"><text:span text:style-name="T3">2.5 day training school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4">Early Career track</text:span></text:p>
                </text:list-item>
                <text:list-item>
                  <text:p text:style-name="P7"><text:span text:style-name="T4">GPU Track</text:span></text:p>
                </text:list-item>
              </text:list>
            </text:list-item>
          </text:list>
          <text:list text:style-name="L2">
            <text:list-item>
              <text:p text:style-name="P6"><text:span text:style-name="T3">Followed by 2.5 day symposium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8.622cm" svg:height="10.478cm" svg:x="1.482cm" svg:y="2.121cm" draw:page-number="3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4" draw:style-name="dp1" draw:master-page-name="Title1">
        <office:forms form:automatic-focus="false" form:apply-design-mode="false"/>
        <draw:custom-shape draw:style-name="gr5" draw:text-style-name="P4" draw:layer="layout" svg:width="25.197cm" svg:height="2.628cm" svg:x="1.27cm" svg:y="1.905cm">
          <text:list text:style-name="L1">
            <text:list-header>
              <text:p text:style-name="P3"><text:span text:style-name="T1">GPU Accelerated Tr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8" draw:layer="layout" svg:width="25.197cm" svg:height="9.133cm" svg:x="1.473cm" svg:y="5.212cm">
          <text:list text:style-name="L2">
            <text:list-item>
              <text:p text:style-name="P6"><text:span text:style-name="T3">Repository is </text:span><text:span text:style-name="T5"><text:a xlink:href="https://github.com/BiAPoL/PoL-BioImage-Analysis-TS-GPU-Accelerated-Image-Analysis" xlink:type="simple">here</text:a></text:span><text:span text:style-name="T3"><text:s/></text:span><text:span text:style-name="T5"><text:a xlink:href="https://github.com/BiAPoL/PoL-BioImage-Analysis-TS-GPU-Accelerated-Image-Analysis" xlink:type="simple">https://github.com/BiAPoL/PoL-BioImage-Analysis-TS-GPU-Accelerated-Image-Analysis</text:a></text:span></text:p>
            </text:list-item>
            <text:list-item>
              <text:p text:style-name="P6"><text:span text:style-name="T3">Jupyter Book</text:span></text:p>
            </text:list-item>
          </text:list>
          <text:list text:style-name="L4">
            <text:list-header>
              <text:p text:style-name="P9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4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5" draw:style-name="dp1" draw:master-page-name="Title1">
        <draw:custom-shape draw:style-name="gr7" draw:text-style-name="P4" draw:layer="layout" svg:width="25.197cm" svg:height="2.628cm" svg:x="1.473cm" svg:y="2.452cm">
          <text:list text:style-name="L1">
            <text:list-header>
              <text:p text:style-name="P3"><text:span text:style-name="T1">GPU Accelerated Tr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8" draw:layer="layout" svg:width="25.197cm" svg:height="9.133cm" svg:x="1.473cm" svg:y="5.212cm">
          <text:list text:style-name="L2">
            <text:list-item>
              <text:p text:style-name="P6"><text:span text:style-name="T3">Software installation</text:span></text:p>
            </text:list-item>
            <text:list-item>
              <text:p text:style-name="P6"><text:span text:style-name="T3">Clesperanto (OpenCl bio-imaging)</text:span></text:p>
            </text:list-item>
            <text:list-item>
              <text:p text:style-name="P6"><text:span text:style-name="T3">Cupy (Cuda math and signal processing)</text:span></text:p>
            </text:list-item>
            <text:list-item>
              <text:p text:style-name="P6"><text:span text:style-name="T3">Deconvolution</text:span></text:p>
            </text:list-item>
            <text:list-item>
              <text:p text:style-name="P6"><text:span text:style-name="T3">High Performance Computing (HPC)</text:span></text:p>
            </text:list-item>
            <text:list-item>
              <text:p text:style-name="P6"><text:span text:style-name="T3">Deep Learning</text:span></text:p>
            </text:list-item>
            <text:list-item>
              <text:p text:style-name="P6"><text:span text:style-name="T3">Dask</text:span></text:p>
            </text:list-item>
          </text:list>
          <text:list text:style-name="L4">
            <text:list-header>
              <text:p text:style-name="P9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5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6" draw:style-name="dp1" draw:master-page-name="Title1">
        <draw:custom-shape draw:style-name="gr9" draw:text-style-name="P11" draw:layer="layout" svg:width="25.197cm" svg:height="2.628cm" svg:x="1.473cm" svg:y="2.452cm">
          <text:list text:style-name="L2">
            <text:list-header>
              <text:p text:style-name="P10"><text:span text:style-name="T1">Background Need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25.197cm" svg:height="9.133cm" svg:x="1.473cm" svg:y="5.212cm">
          <text:list text:style-name="L2">
            <text:list-item>
              <text:p text:style-name="P12"><text:span text:style-name="T3">Python</text:span></text:p>
            </text:list-item>
            <text:list-item>
              <text:p text:style-name="P12"><text:span text:style-name="T3">Github</text:span></text:p>
            </text:list-item>
            <text:list-item>
              <text:p text:style-name="P12"><text:span text:style-name="T3">Jupyter notebooks</text:span></text:p>
            </text:list-item>
            <text:list-item>
              <text:p text:style-name="P12"><text:span text:style-name="T3">Conda environment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6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7" draw:style-name="dp1" draw:master-page-name="Title1">
        <draw:custom-shape draw:style-name="gr11" draw:text-style-name="P4" draw:layer="layout" svg:width="25.197cm" svg:height="2.628cm" svg:x="1.473cm" svg:y="2.452cm">
          <text:list text:style-name="L1">
            <text:list-header>
              <text:p text:style-name="P3"><text:span text:style-name="T1">Course prepa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8" draw:layer="layout" svg:width="25.197cm" svg:height="9.133cm" svg:x="1.473cm" svg:y="5.212cm">
          <text:list text:style-name="L2">
            <text:list-header>
              <text:p text:style-name="P6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8.622cm" svg:height="10.478cm" svg:x="1.482cm" svg:y="2.121cm" draw:page-number="7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8" draw:style-name="dp1" draw:master-page-name="Title1">
        <draw:custom-shape draw:style-name="gr13" draw:text-style-name="P4" draw:layer="layout" svg:width="25.197cm" svg:height="2.628cm" svg:x="1.473cm" svg:y="2.452cm">
          <text:list text:style-name="L1">
            <text:list-header>
              <text:p text:style-name="P3"><text:span text:style-name="T1">Course prepa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8" draw:layer="layout" svg:width="25.197cm" svg:height="9.133cm" svg:x="1.473cm" svg:y="5.212cm">
          <text:list text:style-name="L2">
            <text:list-item>
              <text:p text:style-name="P6"><text:span text:style-name="T3">Instructors teamed up with partner from Technische Universität Dresden</text:span></text:p>
            </text:list-item>
            <text:list-item>
              <text:p text:style-name="P6"><text:span text:style-name="T3">Partner helps review and test material</text:span></text:p>
            </text:list-item>
            <text:list-item>
              <text:p text:style-name="P6"><text:span text:style-name="T3">Instructors encouraged to test using Dresden HPC infrastructure</text:span></text:p>
            </text:list-item>
            <text:list-item>
              <text:p text:style-name="P6"><text:span text:style-name="T3">Students given setup instructions week befor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8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9" draw:style-name="dp1" draw:master-page-name="Title1">
        <draw:custom-shape draw:style-name="gr15" draw:text-style-name="P4" draw:layer="layout" svg:width="25.197cm" svg:height="2.628cm" svg:x="1.473cm" svg:y="2.452cm">
          <text:list text:style-name="L1">
            <text:list-header>
              <text:p text:style-name="P3"><text:span text:style-name="T1">Software Setu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8" draw:layer="layout" svg:width="25.197cm" svg:height="9.133cm" svg:x="1.473cm" svg:y="5.212cm">
          <text:p/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8.622cm" svg:height="10.478cm" svg:x="1.482cm" svg:y="2.121cm" draw:page-number="9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0" draw:style-name="dp1" draw:master-page-name="Title1">
        <office:forms form:automatic-focus="false" form:apply-design-mode="false"/>
        <draw:custom-shape draw:style-name="gr17" draw:text-style-name="P4" draw:layer="layout" svg:width="25.197cm" svg:height="2.628cm" svg:x="1.473cm" svg:y="2.452cm">
          <text:list text:style-name="L1">
            <text:list-header>
              <text:p text:style-name="P3"><text:span text:style-name="T1">Software Setu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8" draw:layer="layout" svg:width="25.197cm" svg:height="9.133cm" svg:x="1.473cm" svg:y="5.212cm">
          <text:list text:style-name="L2">
            <text:list-item>
              <text:p text:style-name="P6"><text:span text:style-name="T3">First session of course </text:span></text:p>
              <text:list>
                <text:list-item>
                  <text:p text:style-name="P6"><text:span text:style-name="T3">Mamba</text:span></text:p>
                </text:list-item>
                <text:list-item>
                  <text:p text:style-name="P6"><text:span text:style-name="T3">devbio/napari</text:span></text:p>
                  <text:p text:style-name="P6"><text:span text:style-name="T3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8.622cm" svg:height="10.478cm" svg:x="1.482cm" svg:y="2.121cm" draw:page-number="10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1" draw:style-name="dp1" draw:master-page-name="Title1">
        <draw:custom-shape draw:style-name="gr19" draw:text-style-name="P4" draw:layer="layout" svg:width="25.197cm" svg:height="2.628cm" svg:x="1.473cm" svg:y="2.452cm">
          <text:list text:style-name="L1">
            <text:list-header>
              <text:p text:style-name="P3"><text:span text:style-name="T1">Clesperanto/Cli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8" draw:layer="layout" svg:width="25.197cm" svg:height="9.133cm" svg:x="1.473cm" svg:y="5.212cm">
          <text:p/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8.622cm" svg:height="10.478cm" svg:x="1.482cm" svg:y="2.121cm" draw:page-number="11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2" draw:style-name="dp1" draw:master-page-name="Title1">
        <draw:custom-shape draw:style-name="gr21" draw:text-style-name="P4" draw:layer="layout" svg:width="25.197cm" svg:height="2.628cm" svg:x="1.473cm" svg:y="2.452cm">
          <text:list text:style-name="L1">
            <text:list-header>
              <text:p text:style-name="P3"><text:span text:style-name="T1">Clesperanto/CLI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8" draw:layer="layout" svg:width="25.197cm" svg:height="9.133cm" svg:x="1.473cm" svg:y="5.212cm">
          <text:list text:style-name="L2">
            <text:list-item>
              <text:p text:style-name="P6"><text:span text:style-name="T3">CLIJ OpenCL for ImageJ</text:span></text:p>
            </text:list-item>
            <text:list-item>
              <text:p text:style-name="P6"><text:span text:style-name="T3">Clesperanto (prototype)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4">Python/Matlab wrappers</text:span></text:p>
                </text:list-item>
              </text:list>
            </text:list-item>
          </text:list>
          <text:list text:style-name="L2">
            <text:list-item>
              <text:p text:style-name="P6"><text:span text:style-name="T3">Clesperanto (c++ version)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4">Pure c++ version that can be wrapped for Python/Java/etc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12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3" draw:style-name="dp1" draw:master-page-name="Title1">
        <draw:custom-shape draw:style-name="gr23" draw:text-style-name="P4" draw:layer="layout" svg:width="25.197cm" svg:height="2.628cm" svg:x="1.473cm" svg:y="2.452cm">
          <text:list text:style-name="L1">
            <text:list-header>
              <text:p text:style-name="P3"><text:span text:style-name="T1">Clesperanto/CLI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8" draw:layer="layout" svg:width="25.197cm" svg:height="9.133cm" svg:x="1.473cm" svg:y="5.212cm">
          <text:list text:style-name="L2">
            <text:list-item>
              <text:p text:style-name="P6"><text:span text:style-name="T3">OpenCL based so works on Macs/AMD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4">(Mac M1 does not support Cuda)</text:span></text:p>
                </text:list-item>
              </text:list>
            </text:list-item>
          </text:list>
          <text:list text:style-name="L2">
            <text:list-item>
              <text:p text:style-name="P6"><text:span text:style-name="T3">Biology/Microscopy focused</text:span></text:p>
            </text:list-item>
          </text:list>
          <text:list text:style-name="L4">
            <text:list-header>
              <text:p text:style-name="P9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13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4" draw:style-name="dp1" draw:master-page-name="Title1">
        <draw:custom-shape draw:style-name="gr25" draw:text-style-name="P2" draw:layer="layout" svg:width="25.197cm" svg:height="2.628cm" svg:x="1.473cm" svg:y="2.452cm">
          <text:p/>
          <draw:enhanced-geometry svg:viewBox="0 0 21600 21600" draw:type="mso-spt202" draw:enhanced-path="M 0 0 L 21600 0 21600 21600 0 21600 0 0 Z N"/>
        </draw:custom-shape>
        <draw:custom-shape draw:style-name="gr26" draw:text-style-name="P8" draw:layer="layout" svg:width="25.197cm" svg:height="9.133cm" svg:x="0.635cm" svg:y="2.932cm">
          <text:list text:style-name="L2">
            <text:list-header>
              <text:p text:style-name="P6"><text:span text:style-name="T3">Clesperant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14" draw:layer="layout" svg:width="18.146cm" svg:height="15.747cm" svg:x="8.524cm" svg:y="0.128cm">
          <draw:image xlink:href="Pictures/10000000000002C70000026979D7019C91E86ADB.png" xlink:type="simple" xlink:show="embed" xlink:actuate="onLoad" draw:mime-type="image/png">
            <text:p/>
          </draw:image>
        </draw:frame>
        <presentation:notes draw:style-name="dp2">
          <draw:page-thumbnail draw:layer="layout" svg:width="18.622cm" svg:height="10.478cm" svg:x="1.482cm" svg:y="2.121cm" draw:page-number="14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5" draw:style-name="dp1" draw:master-page-name="Title1">
        <draw:custom-shape draw:style-name="gr28" draw:text-style-name="P4" draw:layer="layout" svg:width="25.197cm" svg:height="2.628cm" svg:x="1.473cm" svg:y="2.452cm">
          <text:list text:style-name="L1">
            <text:list-header>
              <text:p text:style-name="P3"><text:span text:style-name="T1">Cu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8" draw:layer="layout" svg:width="25.197cm" svg:height="9.133cm" svg:x="1.473cm" svg:y="5.212cm">
          <text:p/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8.622cm" svg:height="10.478cm" svg:x="1.482cm" svg:y="2.121cm" draw:page-number="15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6" draw:style-name="dp1" draw:master-page-name="Title1">
        <draw:custom-shape draw:style-name="gr30" draw:text-style-name="P4" draw:layer="layout" svg:width="25.197cm" svg:height="2.628cm" svg:x="1.473cm" svg:y="2.452cm">
          <text:list text:style-name="L1">
            <text:list-header>
              <text:p text:style-name="P3"><text:span text:style-name="T1">Cu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8" draw:layer="layout" svg:width="25.197cm" svg:height="9.133cm" svg:x="1.473cm" svg:y="5.212cm">
          <text:list text:style-name="L2">
            <text:list-item>
              <text:p text:style-name="P6"><text:span text:style-name="T3">Cuda based GPU-accelerated image and data processing in Python</text:span></text:p>
            </text:list-item>
            <text:list-item>
              <text:p text:style-name="P6"><text:span text:style-name="T3">Dropin replacement for numpy and scipy</text:span></text:p>
            </text:list-item>
            <text:list-item>
              <text:p text:style-name="P6"><text:span text:style-name="T3">API of Cupy is "close" to numpy and scipy so dropin strategy can potentially be used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16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7" draw:style-name="dp1" draw:master-page-name="Title1">
        <draw:custom-shape draw:style-name="gr32" draw:text-style-name="P4" draw:layer="layout" svg:width="25.197cm" svg:height="2.628cm" svg:x="1.473cm" svg:y="2.452cm">
          <text:list text:style-name="L1">
            <text:list-header>
              <text:p text:style-name="P3"><text:span text:style-name="T1">Cupy ‘Dropin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2" draw:layer="layout" svg:width="25.197cm" svg:height="9.133cm" svg:x="1.473cm" svg:y="5.212cm">
          <text:p/>
          <draw:enhanced-geometry svg:viewBox="0 0 21600 21600" draw:type="mso-spt202" draw:enhanced-path="M 0 0 L 21600 0 21600 21600 0 21600 0 0 Z N"/>
        </draw:custom-shape>
        <draw:frame draw:style-name="gr27" draw:text-style-name="P14" draw:layer="layout" svg:width="22.141cm" svg:height="6.055cm" svg:x="3.175cm" svg:y="6.35cm">
          <draw:image xlink:href="Pictures/1000000100000345000000E5EC8B3946AB8EE916.png" xlink:type="simple" xlink:show="embed" xlink:actuate="onLoad" draw:mime-type="image/png">
            <text:p/>
          </draw:image>
        </draw:frame>
        <presentation:notes draw:style-name="dp2">
          <draw:page-thumbnail draw:layer="layout" svg:width="18.622cm" svg:height="10.478cm" svg:x="1.482cm" svg:y="2.121cm" draw:page-number="17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8" draw:style-name="dp1" draw:master-page-name="Title1">
        <draw:custom-shape draw:style-name="gr34" draw:text-style-name="P4" draw:layer="layout" svg:width="25.197cm" svg:height="2.628cm" svg:x="1.473cm" svg:y="2.452cm">
          <text:list text:style-name="L1">
            <text:list-header>
              <text:p text:style-name="P3"><text:span text:style-name="T1">GPU Deconvol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8" draw:layer="layout" svg:width="25.197cm" svg:height="9.133cm" svg:x="1.473cm" svg:y="5.212cm">
          <text:p/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8.622cm" svg:height="10.478cm" svg:x="1.482cm" svg:y="2.121cm" draw:page-number="18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9" draw:style-name="dp1" draw:master-page-name="Title1">
        <draw:custom-shape draw:style-name="gr36" draw:text-style-name="P4" draw:layer="layout" svg:width="25.197cm" svg:height="2.628cm" svg:x="1.473cm" svg:y="2.452cm">
          <text:list text:style-name="L1">
            <text:list-header>
              <text:p text:style-name="P3"><text:span text:style-name="T1">GPU Deconvol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8" draw:layer="layout" svg:width="25.197cm" svg:height="9.133cm" svg:x="1.473cm" svg:y="5.212cm">
          <text:list text:style-name="L2">
            <text:list-item>
              <text:p text:style-name="P6"><text:span text:style-name="T3">GPU greatly accelerates deconvolution calculations</text:span></text:p>
            </text:list-item>
            <text:list-item>
              <text:p text:style-name="P6"><text:span text:style-name="T3">Reviewed CLIJ2, Redlionfish libraries</text:span></text:p>
            </text:list-item>
            <text:list-item>
              <text:p text:style-name="P6"><text:span text:style-name="T3">Looked at several simulations and real images</text:span></text:p>
            </text:list-item>
            <text:list-item>
              <text:p text:style-name="P6"><text:span text:style-name="T3">Showed how deconvolution leads to better measurements.</text:span></text:p>
            </text:list-item>
            <text:list-item>
              <text:p text:style-name="P6"><text:span text:style-name="T3">Deconvolution and Deep learning</text:span></text:p>
              <text:list>
                <text:list-item>
                  <text:p text:style-name="P6"><text:span text:style-name="T3">Important to understand deconvolution before doing 3D Deep learning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19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0" draw:style-name="dp1" draw:master-page-name="Title1">
        <draw:custom-shape draw:style-name="gr38" draw:text-style-name="P4" draw:layer="layout" svg:width="25.197cm" svg:height="2.628cm" svg:x="1.473cm" svg:y="0.635cm">
          <text:list text:style-name="L1">
            <text:list-header>
              <text:p text:style-name="P3"><text:span text:style-name="T1">GPU Deconvolu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14" draw:layer="layout" svg:width="15.566cm" svg:height="9.133cm" svg:x="6.284cm" svg:y="5.212cm">
          <draw:image xlink:href="Pictures/10000017000002580000016080686393729D8AE2.gif" xlink:type="simple" xlink:show="embed" xlink:actuate="onLoad" draw:mime-type="image/gif">
            <text:p/>
          </draw:image>
        </draw:frame>
        <draw:custom-shape draw:style-name="gr39" draw:text-style-name="P8" draw:layer="layout" svg:width="25.197cm" svg:height="9.133cm" svg:x="0.838cm" svg:y="2.932cm">
          <text:list text:style-name="L2">
            <text:list-item>
              <text:p text:style-name="P6"><text:span text:style-name="T6">With GPU feasible to do 1000s of iterations to get dramatic deblurring</text:span></text:p>
            </text:list-item>
          </text:list>
          <draw:enhanced-geometry svg:viewBox="0 0 0 0" draw:text-areas="0 0 ?f3 ?f2" draw:type="rectangle" draw:enhanced-path="M 0 0 L ?f3 0 ?f3 ?f2 0 ?f2 Z N">
            <draw:equation draw:name="f0" draw:formula="25198/2"/>
            <draw:equation draw:name="f1" draw:formula="9133/2"/>
            <draw:equation draw:name="f2" draw:formula="9133"/>
            <draw:equation draw:name="f3" draw:formula="25198"/>
          </draw:enhanced-geometry>
        </draw:custom-shape>
        <presentation:notes draw:style-name="dp2">
          <draw:page-thumbnail draw:layer="layout" svg:width="18.622cm" svg:height="10.478cm" svg:x="1.482cm" svg:y="2.121cm" draw:page-number="20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1" draw:style-name="dp1" draw:master-page-name="Title1">
        <draw:custom-shape draw:style-name="gr40" draw:text-style-name="P4" draw:layer="layout" svg:width="25.197cm" svg:height="2.628cm" svg:x="1.473cm" svg:y="2.452cm">
          <text:list text:style-name="L1">
            <text:list-header>
              <text:p text:style-name="P3"><text:span text:style-name="T1">GPU Deconvol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8" draw:layer="layout" svg:width="25.197cm" svg:height="9.133cm" svg:x="1.473cm" svg:y="5.212cm">
          <text:list text:style-name="L2">
            <text:list-item>
              <text:p text:style-name="P6"><text:span text:style-name="T3">Parameter exploration much faster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21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2" draw:style-name="dp1" draw:master-page-name="Title1">
        <draw:custom-shape draw:style-name="gr25" draw:text-style-name="P2" draw:layer="layout" svg:width="25.197cm" svg:height="2.628cm" svg:x="1.473cm" svg:y="2.452cm">
          <text:p/>
          <draw:enhanced-geometry svg:viewBox="0 0 21600 21600" draw:type="mso-spt202" draw:enhanced-path="M 0 0 L 21600 0 21600 21600 0 21600 0 0 Z N"/>
        </draw:custom-shape>
        <draw:custom-shape draw:style-name="gr33" draw:text-style-name="P2" draw:layer="layout" svg:width="25.197cm" svg:height="9.133cm" svg:x="1.473cm" svg:y="5.212cm">
          <text:p/>
          <draw:enhanced-geometry svg:viewBox="0 0 21600 21600" draw:type="mso-spt202" draw:enhanced-path="M 0 0 L 21600 0 21600 21600 0 21600 0 0 Z N"/>
        </draw:custom-shape>
        <draw:frame draw:style-name="gr27" draw:text-style-name="P14" draw:layer="layout" svg:width="17.538cm" svg:height="4.414cm" svg:x="5.953cm" svg:y="1.905cm">
          <draw:image xlink:href="Pictures/1000000000000297000000A706F70F8D9F0D3F07.png" xlink:type="simple" xlink:show="embed" xlink:actuate="onLoad" draw:mime-type="image/png">
            <text:p/>
          </draw:image>
        </draw:frame>
        <draw:frame draw:style-name="gr27" draw:text-style-name="P14" draw:layer="layout" svg:width="17.538cm" svg:height="4.415cm" svg:x="5.953cm" svg:y="6.376cm">
          <draw:image xlink:href="Pictures/1000000000000297000000A717922BB6DE7D08B5.png" xlink:type="simple" xlink:show="embed" xlink:actuate="onLoad" draw:mime-type="image/png">
            <text:p/>
          </draw:image>
        </draw:frame>
        <draw:frame draw:style-name="gr27" draw:text-style-name="P14" draw:layer="layout" svg:width="17.538cm" svg:height="4.044cm" svg:x="5.953cm" svg:y="10.795cm">
          <draw:image xlink:href="Pictures/100000000000029700000099056219FED825A8B9.png" xlink:type="simple" xlink:show="embed" xlink:actuate="onLoad" draw:mime-type="image/png">
            <text:p/>
          </draw:image>
        </draw:frame>
        <presentation:notes draw:style-name="dp2">
          <draw:page-thumbnail draw:layer="layout" svg:width="18.622cm" svg:height="10.478cm" svg:x="1.482cm" svg:y="2.121cm" draw:page-number="22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3" draw:style-name="dp1" draw:master-page-name="Title1">
        <draw:custom-shape draw:style-name="gr42" draw:text-style-name="P4" draw:layer="layout" svg:width="25.197cm" svg:height="2.628cm" svg:x="1.473cm" svg:y="2.452cm">
          <text:list text:style-name="L1">
            <text:list-header>
              <text:p text:style-name="P3"><text:span text:style-name="T1">GPU Image Simu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8" draw:layer="layout" svg:width="25.197cm" svg:height="9.133cm" svg:x="1.473cm" svg:y="5.212cm">
          <text:list text:style-name="L2">
            <text:list-item>
              <text:p text:style-name="P6"><text:span text:style-name="T3">Create simulated objects and PSF</text:span></text:p>
            </text:list-item>
            <text:list-item>
              <text:p text:style-name="P6"><text:span text:style-name="T3">Used cupy for fast blur and noise simulation (forward)</text:span></text:p>
            </text:list-item>
            <text:list-item>
              <text:p text:style-name="P6"><text:span text:style-name="T3">GPU deconvolution for fast decon parameter testing</text:span></text:p>
            </text:list-item>
            <text:list-item>
              <text:p text:style-name="P6"><text:span text:style-name="T3">Simulations can also be used for DL training and testing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8.622cm" svg:height="10.478cm" svg:x="1.482cm" svg:y="2.121cm" draw:page-number="23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4" draw:style-name="dp4" draw:master-page-name="Title1">
        <draw:frame draw:style-name="gr44" draw:text-style-name="P15" draw:layer="layout" svg:width="16.298cm" svg:height="15.749cm" svg:x="7.89cm" svg:y="0.008cm">
          <draw:image xlink:href="Pictures/100000000000033F000003237A5DB86DBA840BDE.png" xlink:type="simple" xlink:show="embed" xlink:actuate="onLoad" draw:mime-type="image/png">
            <text:p/>
          </draw:image>
        </draw:frame>
        <presentation:notes draw:style-name="dp2">
          <draw:page-thumbnail draw:style-name="gr45" draw:layer="layout" svg:width="18.618cm" svg:height="10.473cm" svg:x="1.482cm" svg:y="2.12cm" draw:page-number="24" presentation:class="page"/>
          <draw:frame presentation:style-name="pr4" draw:text-style-name="P16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25" draw:style-name="dp4" draw:master-page-name="Title1">
        <draw:frame draw:style-name="gr44" draw:text-style-name="P15" draw:layer="layout" svg:width="16.298cm" svg:height="15.749cm" svg:x="7.89cm" svg:y="0.008cm">
          <draw:image xlink:href="Pictures/100000000000033F00000323888EE9F593E128EC.png" xlink:type="simple" xlink:show="embed" xlink:actuate="onLoad" draw:mime-type="image/png">
            <text:p/>
          </draw:image>
        </draw:frame>
        <presentation:notes draw:style-name="dp2">
          <draw:page-thumbnail draw:style-name="gr45" draw:layer="layout" svg:width="18.618cm" svg:height="10.473cm" svg:x="1.482cm" svg:y="2.12cm" draw:page-number="25" presentation:class="page"/>
          <draw:frame presentation:style-name="pr4" draw:text-style-name="P16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26" draw:style-name="dp4" draw:master-page-name="Title1">
        <draw:frame draw:style-name="gr44" draw:text-style-name="P15" draw:layer="layout" svg:width="16.298cm" svg:height="15.749cm" svg:x="7.89cm" svg:y="0.008cm">
          <draw:image xlink:href="Pictures/100000000000033F00000323C33AA24843DC609B.png" xlink:type="simple" xlink:show="embed" xlink:actuate="onLoad" draw:mime-type="image/png">
            <text:p/>
          </draw:image>
        </draw:frame>
        <presentation:notes draw:style-name="dp2">
          <draw:page-thumbnail draw:style-name="gr45" draw:layer="layout" svg:width="18.618cm" svg:height="10.473cm" svg:x="1.482cm" svg:y="2.12cm" draw:page-number="26" presentation:class="page"/>
          <draw:frame presentation:style-name="pr4" draw:text-style-name="P16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27" draw:style-name="dp1" draw:master-page-name="Title1">
        <draw:custom-shape draw:style-name="gr46" draw:text-style-name="P4" draw:layer="layout" svg:width="25.197cm" svg:height="2.628cm" svg:x="1.473cm" svg:y="2.452cm">
          <text:p text:style-name="P17"><text:span text:style-name="T1">High Performance Computing (HPC)</text:span></text:p>
          <draw:enhanced-geometry svg:viewBox="0 0 21600 21600" draw:type="mso-spt202" draw:enhanced-path="M 0 0 L 21600 0 21600 21600 0 21600 0 0 Z N"/>
        </draw:custom-shape>
        <draw:custom-shape draw:style-name="gr47" draw:text-style-name="P8" draw:layer="layout" svg:width="25.197cm" svg:height="9.133cm" svg:x="1.473cm" svg:y="5.212cm">
          <text:p/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8.622cm" svg:height="10.478cm" svg:x="1.482cm" svg:y="2.121cm" draw:page-number="27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8" draw:style-name="dp1" draw:master-page-name="Title1">
        <draw:custom-shape draw:style-name="gr48" draw:text-style-name="P4" draw:layer="layout" svg:width="25.197cm" svg:height="2.628cm" svg:x="1.473cm" svg:y="2.452cm">
          <text:list text:style-name="L1">
            <text:list-header>
              <text:p text:style-name="P3"><text:span text:style-name="T1">High Performance Computing (HPC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8" draw:layer="layout" svg:width="25.197cm" svg:height="9.133cm" svg:x="1.473cm" svg:y="5.212cm">
          <text:list text:style-name="L2">
            <text:list-item>
              <text:p text:style-name="P6"><text:span text:style-name="T3">HPC Machine</text:span></text:p>
              <text:list>
                <text:list-item>
                  <text:p text:style-name="P6"><text:span text:style-name="T3">Collection of computer nodes (CPUs and/or GPUs)</text:span></text:p>
                </text:list-item>
              </text:list>
            </text:list-item>
            <text:list-item>
              <text:p text:style-name="P6"><text:span text:style-name="T3">Dresden ZIH high performance cluster</text:span></text:p>
            </text:list-item>
            <text:list-item>
              <text:p text:style-name="P6"><text:span text:style-name="T3">Learned how to use cluster via</text:span><text:span text:style-name="T3"><text:tab/></text:span><text:span text:style-name="T3"> 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4">Jupyter notebooks</text:span></text:p>
                </text:list-item>
                <text:list-item>
                  <text:p text:style-name="P7"><text:span text:style-name="T4">Command line</text:span></text:p>
                </text:list-item>
              </text:list>
            </text:list-item>
          </text:list>
          <text:list text:style-name="L2">
            <text:list-item>
              <text:p text:style-name="P6"><text:span text:style-name="T3">All examples used in course could be run on cluster</text:span></text:p>
            </text:list-item>
          </text:list>
          <text:list text:style-name="L4">
            <text:list-header>
              <text:p text:style-name="P9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28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9" draw:style-name="dp1" draw:master-page-name="Title1">
        <draw:custom-shape draw:style-name="gr50" draw:text-style-name="P4" draw:layer="layout" svg:width="25.197cm" svg:height="2.628cm" svg:x="1.473cm" svg:y="2.452cm">
          <text:list text:style-name="L1">
            <text:list-header>
              <text:p text:style-name="P3"><text:span text:style-name="T1">High Performance Computing (HPC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8" draw:layer="layout" svg:width="25.197cm" svg:height="9.133cm" svg:x="1.473cm" svg:y="5.212cm">
          <text:list text:style-name="L2">
            <text:list-item>
              <text:p text:style-name="P6"><text:span text:style-name="T3">Course material was very specific to Dresden infrastructure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4">Con: Non-Dresden students did not have long term buy in</text:span></text:p>
                </text:list-item>
                <text:list-item>
                  <text:p text:style-name="P7"><text:span text:style-name="T4">Pro: Good overview of ‘what questions to ask’</text:span></text:p>
                </text:list-item>
                <text:list-item>
                  <text:p text:style-name="P7"><text:span text:style-name="T4">Pro: Most skills were transferable (ie connecting to cluster through Linux terminal)</text:span></text:p>
                </text:list-item>
              </text:list>
            </text:list-item>
          </text:list>
          <text:list text:style-name="L4">
            <text:list-header>
              <text:p text:style-name="P9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29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0" draw:style-name="dp1" draw:master-page-name="Title1">
        <draw:custom-shape draw:style-name="gr52" draw:text-style-name="P4" draw:layer="layout" svg:width="25.197cm" svg:height="2.628cm" svg:x="1.473cm" svg:y="1.182cm">
          <text:list text:style-name="L1">
            <text:list-header>
              <text:p text:style-name="P3"><text:span text:style-name="T1">How do people access GPU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8" draw:layer="layout" svg:width="25.197cm" svg:height="9.133cm" svg:x="1.27cm" svg:y="3.567cm">
          <text:list text:style-name="L2">
            <text:list-item>
              <text:p text:style-name="P6"><text:span text:style-name="T3">Most powerful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4">HPC Cluster</text:span></text:p>
                </text:list-item>
              </text:list>
            </text:list-item>
          </text:list>
          <text:list text:style-name="L2">
            <text:list-item>
              <text:p text:style-name="P6"><text:span text:style-name="T3">Good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4">Cloud VMs (AWS etc.)</text:span></text:p>
                </text:list-item>
                <text:list-item>
                  <text:p text:style-name="P7"><text:span text:style-name="T4">Professional Workstation (ie Dell Precision)</text:span></text:p>
                </text:list-item>
                <text:list-item>
                  <text:p text:style-name="P7"><text:span text:style-name="T4">Multi-GPU Gaming PC</text:span></text:p>
                </text:list-item>
              </text:list>
            </text:list-item>
          </text:list>
          <text:list text:style-name="L2">
            <text:list-header>
              <text:p text:style-name="P6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30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1" draw:style-name="dp1" draw:master-page-name="Title1">
        <draw:custom-shape draw:style-name="gr54" draw:text-style-name="P4" draw:layer="layout" svg:width="25.197cm" svg:height="2.628cm" svg:x="1.473cm" svg:y="1.182cm">
          <text:list text:style-name="L1">
            <text:list-header>
              <text:p text:style-name="P3"><text:span text:style-name="T1">How do people access GPU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8" draw:layer="layout" svg:width="25.197cm" svg:height="9.133cm" svg:x="1.27cm" svg:y="3.567cm">
          <text:list text:style-name="L2">
            <text:list-item>
              <text:p text:style-name="P6"><text:span text:style-name="T3">Acceptable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4">Laptop with modern GPU</text:span></text:p>
                </text:list-item>
              </text:list>
            </text:list-item>
          </text:list>
          <text:list text:style-name="L2">
            <text:list-item>
              <text:p text:style-name="P6"><text:span text:style-name="T3">Not as good</text:span></text:p>
              <text:list>
                <text:list-item>
                  <text:p text:style-name="P6"><text:span text:style-name="T3">Older laptop with no/limited GPU</text:span></text:p>
                </text:list-item>
              </text:list>
            </text:list-item>
            <text:list-item>
              <text:p text:style-name="P6"><text:span text:style-name="T3">Special consideration for newer (M1) Macs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4">Do not support Cuda</text:span></text:p>
                </text:list-item>
              </text:list>
              <text:p text:style-name="P7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8.622cm" svg:height="10.478cm" svg:x="1.482cm" svg:y="2.121cm" draw:page-number="31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2" draw:style-name="dp1" draw:master-page-name="Title1">
        <draw:custom-shape draw:style-name="gr56" draw:text-style-name="P18" draw:layer="layout" svg:width="25.197cm" svg:height="2.628cm" svg:x="1.473cm" svg:y="2.452cm">
          <text:p text:style-name="P17"><text:span text:style-name="T1">Deep Learning</text:span></text:p>
          <draw:enhanced-geometry svg:viewBox="0 0 21600 21600" draw:type="mso-spt202" draw:enhanced-path="M 0 0 L 21600 0 21600 21600 0 21600 0 0 Z N"/>
        </draw:custom-shape>
        <draw:custom-shape draw:style-name="gr57" draw:text-style-name="P8" draw:layer="layout" svg:width="25.197cm" svg:height="9.133cm" svg:x="1.473cm" svg:y="5.212cm">
          <text:p/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8.622cm" svg:height="10.478cm" svg:x="1.482cm" svg:y="2.121cm" draw:page-number="32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3" draw:style-name="dp1" draw:master-page-name="Title1">
        <draw:custom-shape draw:style-name="gr58" draw:text-style-name="P4" draw:layer="layout" svg:width="25.197cm" svg:height="2.628cm" svg:x="0.838cm" svg:y="1.182cm">
          <text:list text:style-name="L1">
            <text:list-header>
              <text:p text:style-name="P3"><text:span text:style-name="T1">Deep Learn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14" draw:layer="layout" svg:width="9.684cm" svg:height="9.133cm" svg:x="8.89cm" svg:y="3.81cm">
          <draw:image xlink:href="Pictures/100000010000046700000427FA61E937DE3A1336.png" xlink:type="simple" xlink:show="embed" xlink:actuate="onLoad" draw:mime-type="image/png">
            <text:p/>
          </draw:image>
        </draw:frame>
        <draw:custom-shape draw:style-name="gr59" draw:text-style-name="P19" draw:layer="layout" svg:width="17.145cm" svg:height="1.671cm" svg:x="4.445cm" svg:y="13.569cm">
          <text:list text:style-name="L1">
            <text:list-header>
              <text:p text:style-name="P1"><text:span text:style-name="T9">UNET architecture: Figure courtesy of Peter Steinbach 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7144/2"/>
            <draw:equation draw:name="f1" draw:formula="1672/2"/>
            <draw:equation draw:name="f2" draw:formula="1672"/>
            <draw:equation draw:name="f3" draw:formula="17144"/>
          </draw:enhanced-geometry>
        </draw:custom-shape>
        <presentation:notes draw:style-name="dp2">
          <draw:page-thumbnail draw:layer="layout" svg:width="18.622cm" svg:height="10.478cm" svg:x="1.482cm" svg:y="2.121cm" draw:page-number="33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4" draw:style-name="dp1" draw:master-page-name="Title1">
        <draw:custom-shape draw:style-name="gr60" draw:text-style-name="P4" draw:layer="layout" svg:width="25.197cm" svg:height="2.628cm" svg:x="1.473cm" svg:y="2.452cm">
          <text:list text:style-name="L1">
            <text:list-header>
              <text:p text:style-name="P3"><text:span text:style-name="T1">Deep lear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8" draw:layer="layout" svg:width="25.197cm" svg:height="9.133cm" svg:x="1.473cm" svg:y="5.212cm">
          <text:list text:style-name="L2">
            <text:list-item>
              <text:p text:style-name="P6"><text:span text:style-name="T3">Pytorch Overview</text:span></text:p>
            </text:list-item>
            <text:list-item>
              <text:p text:style-name="P6"><text:span text:style-name="T3">Segmantic Segmentation with Pytorch unet</text:span></text:p>
            </text:list-item>
            <text:list-item>
              <text:p text:style-name="P6"><text:span text:style-name="T3">Denoising with noise2void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8.622cm" svg:height="10.478cm" svg:x="1.482cm" svg:y="2.121cm" draw:page-number="34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5" draw:style-name="dp1" draw:master-page-name="Title1">
        <draw:custom-shape draw:style-name="gr62" draw:text-style-name="P4" draw:layer="layout" svg:width="25.197cm" svg:height="2.628cm" svg:x="1.473cm" svg:y="2.452cm">
          <text:list text:style-name="L1">
            <text:list-header>
              <text:p text:style-name="P3"><text:span text:style-name="T1">Deep Lear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8" draw:layer="layout" svg:width="25.197cm" svg:height="9.133cm" svg:x="1.473cm" svg:y="5.212cm">
          <text:list text:style-name="L2">
            <text:list-item>
              <text:p text:style-name="P6"><text:span text:style-name="T3">Could also consider CSB-Deep</text:span></text:p>
              <text:list>
                <text:list-item>
                  <text:p text:style-name="P6"><text:span text:style-name="T3">High level wrapper around Unets</text:span></text:p>
                </text:list-item>
                <text:list-item>
                  <text:p text:style-name="P6"><text:span text:style-name="T3">CARE (image-image transformation)</text:span></text:p>
                </text:list-item>
                <text:list-item>
                  <text:p text:style-name="P6"><text:span text:style-name="T3">Stardist (instance segmentation) </text:span></text:p>
                </text:list-item>
              </text:list>
            </text:list-item>
          </text:list>
          <text:list text:style-name="L3">
            <text:list-item>
              <text:list>
                <text:list-header>
                  <text:p text:style-name="P7"><text:span text:style-name="T4"/></text:p>
                </text:list-header>
              </text:list>
            </text:list-item>
          </text:list>
          <text:list text:style-name="L4">
            <text:list-header>
              <text:p text:style-name="P9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35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6" draw:style-name="dp1" draw:master-page-name="Title1">
        <draw:custom-shape draw:style-name="gr25" draw:text-style-name="P2" draw:layer="layout" svg:width="25.197cm" svg:height="2.628cm" svg:x="1.473cm" svg:y="2.452cm">
          <text:p/>
          <draw:enhanced-geometry svg:viewBox="0 0 21600 21600" draw:type="mso-spt202" draw:enhanced-path="M 0 0 L 21600 0 21600 21600 0 21600 0 0 Z N"/>
        </draw:custom-shape>
        <draw:custom-shape draw:style-name="gr64" draw:text-style-name="P8" draw:layer="layout" svg:width="25.197cm" svg:height="9.133cm" svg:x="1.473cm" svg:y="5.212cm">
          <text:list text:style-name="L2">
            <text:list-item>
              <text:p text:style-name="P6"><text:span text:style-name="T3">CAR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7" draw:text-style-name="P14" draw:layer="layout" svg:width="16.294cm" svg:height="15.747cm" svg:x="7.832cm" svg:y="0cm">
          <draw:image xlink:href="Pictures/100000000000033F00000323ABDAEBCE94557BDA.png" xlink:type="simple" xlink:show="embed" xlink:actuate="onLoad" draw:mime-type="image/png">
            <text:p/>
          </draw:image>
        </draw:frame>
        <presentation:notes draw:style-name="dp2">
          <draw:page-thumbnail draw:layer="layout" svg:width="18.622cm" svg:height="10.478cm" svg:x="1.482cm" svg:y="2.121cm" draw:page-number="36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7" draw:style-name="dp1" draw:master-page-name="Title1">
        <draw:custom-shape draw:style-name="gr25" draw:text-style-name="P2" draw:layer="layout" svg:width="25.197cm" svg:height="2.628cm" svg:x="1.473cm" svg:y="2.452cm">
          <text:p/>
          <draw:enhanced-geometry svg:viewBox="0 0 21600 21600" draw:type="mso-spt202" draw:enhanced-path="M 0 0 L 21600 0 21600 21600 0 21600 0 0 Z N"/>
        </draw:custom-shape>
        <draw:custom-shape draw:style-name="gr65" draw:text-style-name="P8" draw:layer="layout" svg:width="25.197cm" svg:height="9.133cm" svg:x="1.473cm" svg:y="5.212cm">
          <text:list text:style-name="L2">
            <text:list-item>
              <text:p text:style-name="P6"><text:span text:style-name="T3">CAR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7" draw:text-style-name="P14" draw:layer="layout" svg:width="16.294cm" svg:height="15.747cm" svg:x="7.832cm" svg:y="0.106cm">
          <draw:image xlink:href="Pictures/100000000000033F00000323563A203FA3D6F1BA.png" xlink:type="simple" xlink:show="embed" xlink:actuate="onLoad" draw:mime-type="image/png">
            <text:p/>
          </draw:image>
        </draw:frame>
        <presentation:notes draw:style-name="dp2">
          <draw:page-thumbnail draw:layer="layout" svg:width="18.622cm" svg:height="10.478cm" svg:x="1.482cm" svg:y="2.121cm" draw:page-number="37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8" draw:style-name="dp1" draw:master-page-name="Title1">
        <draw:custom-shape draw:style-name="gr66" draw:text-style-name="P4" draw:layer="layout" svg:width="25.197cm" svg:height="2.628cm" svg:x="1.473cm" svg:y="2.452cm">
          <text:list text:style-name="L1">
            <text:list-header>
              <text:p text:style-name="P3"><text:span text:style-name="T1">Deep Learning with GP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8" draw:layer="layout" svg:width="25.197cm" svg:height="9.133cm" svg:x="1.473cm" svg:y="5.212cm">
          <text:list text:style-name="L2">
            <text:list-item>
              <text:p text:style-name="P6"><text:span text:style-name="T3">GPU needed to make DL training feasible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4">For 2D ‘decent’ gaming GPU OK</text:span></text:p>
                </text:list-item>
                <text:list-item>
                  <text:p text:style-name="P7"><text:span text:style-name="T4">For 3D SOTA GPU (IE RTX 4090) needed</text:span></text:p>
                </text:list-item>
              </text:list>
            </text:list-item>
          </text:list>
          <text:list text:style-name="L2">
            <text:list-item>
              <text:p text:style-name="P6"><text:span text:style-name="T3">HPC cluster 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4">Needed for large training set size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38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9" draw:style-name="dp1" draw:master-page-name="Title1">
        <draw:custom-shape draw:style-name="gr68" draw:text-style-name="P18" draw:layer="layout" svg:width="25.197cm" svg:height="2.628cm" svg:x="1.473cm" svg:y="2.452cm">
          <text:p text:style-name="P17"><text:span text:style-name="T1">Dask</text:span></text:p>
          <draw:enhanced-geometry svg:viewBox="0 0 21600 21600" draw:type="mso-spt202" draw:enhanced-path="M 0 0 L 21600 0 21600 21600 0 21600 0 0 Z N"/>
        </draw:custom-shape>
        <draw:custom-shape draw:style-name="gr69" draw:text-style-name="P8" draw:layer="layout" svg:width="25.197cm" svg:height="9.133cm" svg:x="1.473cm" svg:y="5.212cm">
          <text:p/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8.622cm" svg:height="10.478cm" svg:x="1.482cm" svg:y="2.121cm" draw:page-number="39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40" draw:style-name="dp1" draw:master-page-name="Title1">
        <draw:custom-shape draw:style-name="gr70" draw:text-style-name="P4" draw:layer="layout" svg:width="25.197cm" svg:height="2.628cm" svg:x="1.473cm" svg:y="2.452cm">
          <text:list text:style-name="L1">
            <text:list-header>
              <text:p text:style-name="P3"><text:span text:style-name="T1">Das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8" draw:layer="layout" svg:width="25.197cm" svg:height="9.133cm" svg:x="1.173cm" svg:y="5.212cm">
          <text:list text:style-name="L2">
            <text:list-item>
              <text:p text:style-name="P6"><text:span text:style-name="T3"><text:s/></text:span><text:span text:style-name="T3">an open-source Python library for parallel computing</text:span></text:p>
            </text:list-item>
            <text:list-item>
              <text:p text:style-name="P6"><text:span text:style-name="T3">Image processing extension that makes it easy to process large images in block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40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41" draw:style-name="dp4" draw:master-page-name="Title1">
        <draw:custom-shape draw:style-name="gr72" draw:text-style-name="P4" draw:layer="layout" svg:width="25.197cm" svg:height="2.628cm" svg:x="1.472cm" svg:y="2.453cm">
          <text:list text:style-name="L1">
            <text:list-header>
              <text:p text:style-name="P3"><text:span text:style-name="T1">Das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8" draw:layer="layout" svg:width="25.197cm" svg:height="9.133cm" svg:x="1.172cm" svg:y="5.213cm">
          <text:list text:style-name="L2">
            <text:list-item>
              <text:p text:style-name="P6"><text:span text:style-name="T3"><text:s/></text:span><text:span text:style-name="T3">an open-source Python library for parallel computing</text:span></text:p>
            </text:list-item>
            <text:list-item>
              <text:p text:style-name="P6"><text:span text:style-name="T3">Image processing extension that makes it easy to process large images in block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5" draw:layer="layout" svg:width="18.618cm" svg:height="10.473cm" svg:x="1.482cm" svg:y="2.12cm" draw:page-number="41" presentation:class="page"/>
          <draw:frame presentation:style-name="pr4" draw:text-style-name="P16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42" draw:style-name="dp1" draw:master-page-name="Title1">
        <draw:custom-shape draw:style-name="gr74" draw:text-style-name="P18" draw:layer="layout" svg:width="25.197cm" svg:height="2.628cm" svg:x="1.473cm" svg:y="2.452cm">
          <text:p text:style-name="P17"><text:span text:style-name="T1">Iteration 2</text:span></text:p>
          <draw:enhanced-geometry svg:viewBox="0 0 21600 21600" draw:type="mso-spt202" draw:enhanced-path="M 0 0 L 21600 0 21600 21600 0 21600 0 0 Z N"/>
        </draw:custom-shape>
        <draw:custom-shape draw:style-name="gr75" draw:text-style-name="P8" draw:layer="layout" svg:width="25.197cm" svg:height="9.133cm" svg:x="1.473cm" svg:y="5.212cm">
          <text:p/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8.622cm" svg:height="10.478cm" svg:x="1.482cm" svg:y="2.121cm" draw:page-number="42" presentation:class="page"/>
          <draw:frame presentation:style-name="pr3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43" draw:style-name="dp1" draw:master-page-name="Title1">
        <draw:custom-shape draw:style-name="gr76" draw:text-style-name="P21" draw:layer="layout" svg:width="25.197cm" svg:height="2.628cm" svg:x="1.473cm" svg:y="1.252cm">
          <text:list text:style-name="L1">
            <text:list-header>
              <text:p text:style-name="P20"><text:span text:style-name="T1">Iteration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24" draw:layer="layout" svg:width="25.197cm" svg:height="9.133cm" svg:x="1.473cm" svg:y="4.012cm">
          <text:list text:style-name="L2">
            <text:list-item>
              <text:p text:style-name="P22"><text:span text:style-name="T3">5 day course instead of 2.5</text:span></text:p>
            </text:list-item>
            <text:list-item>
              <text:p text:style-name="P22"><text:span text:style-name="T3">Show relationships between classical and DL</text:span></text:p>
              <text:list>
                <text:list-item>
                  <text:p text:style-name="P22"><text:span text:style-name="T3">Cupy/Clij segmentation and DL segmentation</text:span></text:p>
                </text:list-item>
                <text:list-item>
                  <text:p text:style-name="P22"><text:span text:style-name="T3">Deconvolution and AI restoration</text:span></text:p>
                </text:list-item>
              </text:list>
            </text:list-item>
            <text:list-item>
              <text:p text:style-name="P22"><text:span text:style-name="T3">Software installation/HPC</text:span></text:p>
              <text:list>
                <text:list-item>
                  <text:p text:style-name="P22"><text:span text:style-name="T3">Focus on ‘accessing GPU’</text:span></text:p>
                </text:list-item>
                <text:list-item>
                  <text:p text:style-name="P22"><text:span text:style-name="T3">Customize solutions</text:span></text:p>
                </text:list-item>
              </text:list>
            </text:list-item>
            <text:list-item>
              <text:p text:style-name="P22"><text:span text:style-name="T3">More time for personal projects</text:span></text:p>
            </text:list-item>
          </text:list>
          <text:list text:style-name="L4">
            <text:list-header>
              <text:p text:style-name="P23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8.622cm" svg:height="10.478cm" svg:x="1.482cm" svg:y="2.121cm" draw:page-number="43" presentation:class="page"/>
          <draw:frame presentation:style-name="pr3" draw:text-style-name="P2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44" draw:style-name="dp4" draw:master-page-name="Title1">
        <draw:custom-shape draw:style-name="gr78" draw:text-style-name="P4" draw:layer="layout" svg:width="25.197cm" svg:height="2.628cm" svg:x="1.473cm" svg:y="2.453cm">
          <text:list text:style-name="L1">
            <text:list-header>
              <text:p text:style-name="P3"><text:span text:style-name="T1">Acknowledg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8" draw:layer="layout" svg:width="25.197cm" svg:height="9.133cm" svg:x="1.473cm" svg:y="5.213cm">
          <text:p text:style-name="P6"><text:span text:style-name="T8">Stephane Rigaud, Till Korten, Neringa Jurenaite, Apurv Deepak Kulkarni, Peter Steinbach, Sebastian Starke, Johannes Soltwedel, Marvin Albert and Robert Haas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5" draw:layer="layout" svg:width="18.618cm" svg:height="10.473cm" svg:x="1.482cm" svg:y="2.12cm" draw:page-number="44" presentation:class="page"/>
          <draw:frame presentation:style-name="pr4" draw:text-style-name="P16" draw:layer="layout" svg:width="17.268cm" svg:height="12.568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966000005783885B3570A89B65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04cm" fo:margin-bottom="0.004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1" style:font-family-asian="'Noto Sans CJK SC'" style:font-pitch-asian="variable" style:font-size-asian="18pt" style:font-style-asian="normal" style:font-weight-asian="normal" style:font-name-complex="Noto Sans CJK SC1" style:font-family-complex="'Noto Sans CJK S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04cm" fo:margin-bottom="0.004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1" style:font-family-asian="'Noto Sans CJK SC'" style:font-pitch-asian="variable" style:font-size-asian="18pt" style:font-style-asian="normal" style:font-weight-asian="normal" style:font-name-complex="Noto Sans CJK SC1" style:font-family-complex="'Noto Sans CJK S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03cm" fo:margin-bottom="0.004cm" fo:line-height="93%" fo:text-align="start" fo:text-indent="-0.953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32pt" style:font-style-asian="normal" style:font-weight-asian="normal" style:font-name-complex="Noto Sans CJK SC1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4cm" fo:margin-right="0cm" fo:margin-top="0.401cm" fo:margin-bottom="0.004cm" fo:line-height="93%" fo:text-align="start" fo:text-indent="-0.794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SC1" style:font-family-asian="'Noto Sans CJK SC'" style:font-pitch-asian="variable" style:font-size-asian="28pt" style:font-style-asian="normal" style:font-weight-asian="normal" style:font-name-complex="Noto Sans CJK SC1" style:font-family-complex="'Noto Sans CJK SC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304cm" fo:margin-bottom="0.004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SC1" style:font-family-asian="'Noto Sans CJK SC'" style:font-pitch-asian="variable" style:font-size-asian="24pt" style:font-style-asian="normal" style:font-weight-asian="normal" style:font-name-complex="Noto Sans CJK SC1" style:font-family-complex="'Noto Sans CJK SC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3cm" fo:margin-bottom="0.004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.004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04cm" fo:margin-bottom="0.004cm" fo:line-height="93%" fo:text-align="center" fo:text-indent="-0.953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32pt" style:font-style-asian="normal" style:font-weight-asian="normal" style:font-name-complex="Noto Sans CJK SC1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.004cm" fo:margin-bottom="0.004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44pt" style:font-style-asian="normal" style:font-weight-asian="normal" style:font-name-complex="Noto Sans CJK SC1" style:font-family-complex="'Noto Sans CJK S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03cm" fo:margin-bottom="0.004cm" fo:line-height="93%" fo:text-align="start" fo:text-indent="-0.953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32pt" style:font-style-asian="normal" style:font-weight-asian="normal" style:font-name-complex="Noto Sans CJK SC1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4cm" fo:margin-right="0cm" fo:margin-top="0.401cm" fo:margin-bottom="0.004cm" fo:line-height="93%" fo:text-align="start" fo:text-indent="-0.794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SC1" style:font-family-asian="'Noto Sans CJK SC'" style:font-pitch-asian="variable" style:font-size-asian="28pt" style:font-style-asian="normal" style:font-weight-asian="normal" style:font-name-complex="Noto Sans CJK SC1" style:font-family-complex="'Noto Sans CJK SC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304cm" fo:margin-bottom="0.004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SC1" style:font-family-asian="'Noto Sans CJK SC'" style:font-pitch-asian="variable" style:font-size-asian="24pt" style:font-style-asian="normal" style:font-weight-asian="normal" style:font-name-complex="Noto Sans CJK SC1" style:font-family-complex="'Noto Sans CJK SC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203cm" fo:margin-bottom="0.004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01cm" fo:margin-bottom="0.004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04cm" fo:margin-bottom="0.004cm" fo:line-height="93%" fo:text-align="center" fo:text-indent="-0.953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32pt" style:font-style-asian="normal" style:font-weight-asian="normal" style:font-name-complex="Noto Sans CJK SC1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.004cm" fo:margin-bottom="0.004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44pt" style:font-style-asian="normal" style:font-weight-asian="normal" style:font-name-complex="Noto Sans CJK SC1" style:font-family-complex="'Noto Sans CJK S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004cm" fo:margin-bottom="0.004cm" fo:line-height="100%" fo:text-align="center" fo:text-indent="0cm" style:punctuation-wrap="simple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margin-top="0.004cm" fo:margin-bottom="0.004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margin-top="0.004cm" fo:margin-bottom="0.004cm" fo:line-height="100%" fo:text-align="end" fo:text-indent="0cm" style:punctuation-wrap="simple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margin-top="0.004cm" fo:margin-bottom="0.004cm" fo:line-height="100%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style:paragraph-properties fo:margin-left="0cm" fo:margin-right="0cm" fo:margin-top="0.004cm" fo:margin-bottom="0.004cm" fo:line-height="100%" fo:text-indent="0cm" style:punctuation-wrap="simple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margin-top="0.004cm" fo:margin-bottom="0.004cm" fo:line-height="100%" fo:text-indent="0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style:paragraph-properties fo:margin-left="0cm" fo:margin-right="0cm" fo:margin-top="0.004cm" fo:margin-bottom="0.004cm" fo:line-height="93%" fo:text-indent="0cm" style:punctuation-wrap="simple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3" style:family="paragraph">
      <loext:graphic-properties draw:fill="none" draw:fill-color="#ffffff"/>
      <style:paragraph-properties fo:margin-left="0cm" fo:margin-right="0cm" fo:margin-top="0.004cm" fo:margin-bottom="0.004cm" fo:line-height="93%" fo:text-indent="0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4" style:family="paragraph">
      <style:paragraph-properties fo:margin-left="0cm" fo:margin-right="0cm" fo:margin-top="0.004cm" fo:margin-bottom="0.004cm" fo:line-height="93%" fo:text-align="end" fo:text-indent="0cm" style:punctuation-wrap="simple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5" style:family="paragraph">
      <loext:graphic-properties draw:fill="none" draw:fill-color="#ffffff"/>
      <style:paragraph-properties fo:margin-left="0cm" fo:margin-right="0cm" fo:margin-top="0.004cm" fo:margin-bottom="0.004cm" fo:line-height="93%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loext:opacity="100%" style:text-position="0% 100%" style:font-name="Times New Roman" fo:font-size="14pt" fo:language="en" fo:country="US" style:font-name-asian="DejaVu Sans" style:font-size-asian="14pt" style:language-asian="en" style:country-asian="US" style:font-name-complex="DejaVu Sans" style:font-size-complex="14pt" style:language-complex="en" style:country-complex="US"/>
    </style:style>
    <style:style style:name="MT2" style:family="text">
      <style:text-properties fo:color="#000000" loext:opacity="100%" style:font-name="Times New Roman" fo:font-size="14pt" fo:language="en" fo:country="US" style:font-name-asian="DejaVu Sans" style:font-size-asian="14pt" style:language-asian="en" style:country-asian="US" style:font-name-complex="DejaVu San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2.624cm" svg:x="1.472cm" svg:y="2.452cm" presentation:class="title" presentation:placeholder="true">
        <draw:text-box/>
      </draw:frame>
      <draw:frame presentation:style-name="Default-outline1" draw:layer="backgroundobjects" svg:width="25.193cm" svg:height="9.128cm" svg:x="1.472cm" svg:y="5.212cm" presentation:class="outline" presentation:placeholder="true">
        <draw:text-box/>
      </draw:frame>
      <draw:frame draw:style-name="Mgr3" draw:text-style-name="MP6" draw:layer="backgroundobjects" svg:width="8.868cm" svg:height="1.081cm" svg:x="9.578cm" svg:y="14.348cm" presentation:class="footer">
        <draw:text-box>
          <text:list text:style-name="ML1">
            <text:list-header>
              <text:p text:style-name="MP5"><text:span text:style-name="MT1"><presentation:footer/></text:span></text:p>
            </text:list-header>
          </text:list>
        </draw:text-box>
      </draw:frame>
      <draw:frame draw:style-name="Mgr4" draw:text-style-name="MP8" draw:layer="backgroundobjects" svg:width="6.518cm" svg:height="1.081cm" svg:x="20.077cm" svg:y="14.348cm" presentation:class="page-number">
        <draw:text-box>
          <text:list text:style-name="ML1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draw:frame draw:style-name="Mgr5" draw:text-style-name="MP10" draw:layer="backgroundobjects" svg:width="6.517cm" svg:height="1.081cm" svg:x="1.397cm" svg:y="14.348cm" presentation:class="date-time">
        <draw:text-box>
          <text:list text:style-name="ML1">
            <text:list-header>
              <text:p text:style-name="MP9"><text:span text:style-name="MT2"><presentation:date-time/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21.59cm" svg:height="27.94cm" svg:x="0cm" svg:y="0cm">
          <text:p/>
        </draw:rect>
        <draw:page-thumbnail presentation:style-name="Default-title" draw:layer="backgroundobjects" svg:width="18.618cm" svg:height="10.473cm" svg:x="1.482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7" draw:text-style-name="MP13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2"><text:span text:style-name="MT2"><presentation:header/></text:span></text:p>
              </text:list-header>
            </text:list>
          </draw:text-box>
        </draw:frame>
        <draw:frame draw:style-name="Mgr8" draw:text-style-name="MP15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4"><text:span text:style-name="MT2"><presentation:date-time/></text:span></text:p>
              </text:list-header>
            </text:list>
          </draw:text-box>
        </draw:frame>
        <draw:frame draw:style-name="Mgr9" draw:text-style-name="MP13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2"><text:span text:style-name="MT2"><presentation:footer/></text:span></text:p>
              </text:list-header>
            </text:list>
          </draw:text-box>
        </draw:frame>
        <draw:frame draw:style-name="Mgr10" draw:text-style-name="MP15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11" draw:text-style-name="MP6" draw:layer="backgroundobjects" svg:width="8.868cm" svg:height="1.081cm" svg:x="9.578cm" svg:y="14.348cm" presentation:class="footer">
        <draw:text-box>
          <text:list text:style-name="ML1">
            <text:list-header>
              <text:p text:style-name="MP5"><text:span text:style-name="MT1"><presentation:footer/></text:span></text:p>
            </text:list-header>
          </text:list>
        </draw:text-box>
      </draw:frame>
      <draw:frame draw:style-name="Mgr12" draw:text-style-name="MP8" draw:layer="backgroundobjects" svg:width="6.518cm" svg:height="1.081cm" svg:x="20.077cm" svg:y="14.348cm" presentation:class="page-number">
        <draw:text-box>
          <text:list text:style-name="ML1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draw:frame draw:style-name="Mgr13" draw:text-style-name="MP10" draw:layer="backgroundobjects" svg:width="6.517cm" svg:height="1.081cm" svg:x="1.397cm" svg:y="14.348cm" presentation:class="date-time">
        <draw:text-box>
          <text:list text:style-name="ML1">
            <text:list-header>
              <text:p text:style-name="MP9"><text:span text:style-name="MT2"><presentation:date-time/></text:span></text:p>
            </text:list-header>
          </text:list>
        </draw:text-box>
      </draw:frame>
      <draw:frame presentation:style-name="Title1-title" draw:layer="backgroundobjects" svg:width="25.197cm" svg:height="2.624cm" svg:x="1.397cm" svg:y="0.626cm" presentation:class="title" presentation:placeholder="true">
        <draw:text-box/>
      </draw:frame>
      <draw:frame presentation:style-name="Title1-outline1" draw:layer="backgroundobjects" svg:width="25.197cm" svg:height="9.132cm" svg:x="1.397cm" svg:y="3.687cm" presentation:class="outline" presentation:placeholder="true">
        <draw:text-box/>
      </draw:frame>
      <presentation:notes style:page-layout-name="PM0">
        <draw:rect draw:style-name="Mgr6" draw:text-style-name="MP11" draw:layer="backgroundobjects" svg:width="21.59cm" svg:height="27.94cm" svg:x="0cm" svg:y="0cm">
          <text:p/>
        </draw:rect>
        <draw:page-thumbnail presentation:style-name="Title1-title" draw:layer="backgroundobjects" svg:width="18.618cm" svg:height="10.473cm" svg:x="1.482cm" svg:y="2.12cm" presentation:class="page"/>
        <draw:frame presentation:style-name="Title1-notes" draw:layer="backgroundobjects" svg:width="17.268cm" svg:height="12.568cm" svg:x="2.161cm" svg:y="13.269cm" presentation:class="notes" presentation:placeholder="true">
          <draw:text-box/>
        </draw:frame>
        <draw:frame presentation:style-name="Mpr1" draw:text-style-name="MP13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2"><text:span text:style-name="MT2"><presentation:header/></text:span></text:p>
              </text:list-header>
            </text:list>
          </draw:text-box>
        </draw:frame>
        <draw:frame presentation:style-name="Mpr2" draw:text-style-name="MP15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4"><text:span text:style-name="MT2"><presentation:date-time/></text:span></text:p>
              </text:list-header>
            </text:list>
          </draw:text-box>
        </draw:frame>
        <draw:frame presentation:style-name="Mpr3" draw:text-style-name="MP13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2"><text:span text:style-name="MT2"><presentation:footer/></text:span></text:p>
              </text:list-header>
            </text:list>
          </draw:text-box>
        </draw:frame>
        <draw:frame presentation:style-name="Mpr4" draw:text-style-name="MP15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4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4T07:31:30</meta:creation-date>
    <dc:date>2023-10-19T11:40:21.329942851</dc:date>
    <meta:editing-cycles>18</meta:editing-cycles>
    <meta:editing-duration>P1DT1H7M7S</meta:editing-duration>
    <meta:generator>LibreOffice/7.3.7.2$Linux_X86_64 LibreOffice_project/30$Build-2</meta:generator>
    <meta:document-statistic meta:object-count="216"/>
    <meta:user-defined meta:name="AppVersion">15.0000</meta:user-defined>
  </office:meta>
</office:document-meta>
</file>